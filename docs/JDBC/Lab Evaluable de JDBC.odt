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3pt" officeooo:rsid="000511f2" officeooo:paragraph-rsid="000511f2" style:font-size-asian="13pt" style:font-size-complex="13pt"/>
    </style:style>
    <style:style style:name="P2" style:family="paragraph" style:parent-style-name="Standard">
      <style:text-properties fo:color="#000000" fo:font-size="13pt" officeooo:paragraph-rsid="000511f2" style:font-size-asian="13pt" style:font-size-complex="13pt"/>
    </style:style>
    <style:style style:name="P3" style:family="paragraph" style:parent-style-name="Standard">
      <style:text-properties officeooo:paragraph-rsid="000511f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officeooo:paragraph-rsid="000511f2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officeooo:rsid="000511f2" officeooo:paragraph-rsid="000511f2" style:font-size-asian="13pt" style:font-size-complex="13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officeooo:rsid="0005e173" officeooo:paragraph-rsid="0005e173" style:font-size-asian="13pt" style:font-size-complex="13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officeooo:rsid="00069977" officeooo:paragraph-rsid="00069977" style:font-size-asian="13pt" style:font-size-complex="13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background-color="transparent" style:font-size-asian="13pt" style:font-size-complex="13pt"/>
    </style:style>
    <style:style style:name="T1" style:family="text">
      <style:text-properties style:font-name="Consolas"/>
    </style:style>
    <style:style style:name="T2" style:family="text">
      <style:text-properties style:font-name="Consolas"/>
    </style:style>
    <style:style style:name="T3" style:family="text">
      <style:text-properties style:font-name="Consolas" fo:font-style="italic" fo:font-weight="bold" style:font-style-asian="italic" style:font-weight-asian="bold"/>
    </style:style>
    <style:style style:name="T4" style:family="text">
      <style:text-properties style:font-name="Consolas"/>
    </style:style>
    <style:style style:name="T5" style:family="text">
      <style:text-properties style:font-name="Consolas"/>
    </style:style>
    <style:style style:name="T6" style:family="text">
      <style:text-properties style:font-name="Consolas"/>
    </style:style>
    <style:style style:name="T7" style:family="text">
      <style:text-properties style:font-name="Consolas"/>
    </style:style>
    <style:style style:name="T8" style:family="text">
      <style:text-properties style:font-name="Consolas"/>
    </style:style>
    <style:style style:name="T9" style:family="text">
      <style:text-properties style:font-name="Consolas"/>
    </style:style>
    <style:style style:name="T10" style:family="text">
      <style:text-properties style:font-name="Consolas" style:text-underline-style="solid" style:text-underline-width="auto" style:text-underline-color="font-color"/>
    </style:style>
    <style:style style:name="T11" style:family="text">
      <style:text-properties style:font-name="Consolas" style:text-underline-style="solid" style:text-underline-width="auto" style:text-underline-color="font-color"/>
    </style:style>
    <style:style style:name="T12" style:family="text">
      <style:text-properties style:font-name="Consolas"/>
    </style:style>
    <style:style style:name="T13" style:family="text">
      <style:text-properties style:font-name="Consolas"/>
    </style:style>
    <style:style style:name="T14" style:family="text">
      <style:text-properties style:font-name="Consolas"/>
    </style:style>
    <style:style style:name="T15" style:family="text">
      <style:text-properties style:font-name="Consolas"/>
    </style:style>
    <style:style style:name="T16" style:family="text">
      <style:text-properties style:font-name="Consolas" officeooo:rsid="000511f2"/>
    </style:style>
    <style:style style:name="T17" style:family="text">
      <style:text-properties style:font-name="Consolas" officeooo:rsid="000511f2"/>
    </style:style>
    <style:style style:name="T18" style:family="text">
      <style:text-properties style:font-name="Consolas"/>
    </style:style>
    <style:style style:name="T19" style:family="text">
      <style:text-properties style:font-name="Consolas" fo:background-color="transparent" loext:char-shading-value="0"/>
    </style:style>
    <style:style style:name="T20" style:family="text">
      <style:text-properties style:font-name="Consolas" fo:background-color="transparent" loext:char-shading-value="0"/>
    </style:style>
    <style:style style:name="T21" style:family="text">
      <style:text-properties style:font-name="Consolas" fo:background-color="transparent" loext:char-shading-value="0"/>
    </style:style>
    <style:style style:name="T22" style:family="text">
      <style:text-properties style:font-name="Consolas" fo:background-color="transparent" loext:char-shading-value="0"/>
    </style:style>
    <style:style style:name="T23" style:family="text">
      <style:text-properties style:font-name="Consolas" fo:background-color="transparent" loext:char-shading-value="0"/>
    </style:style>
    <style:style style:name="T24" style:family="text">
      <style:text-properties style:font-name="Consolas" fo:background-color="transparent" loext:char-shading-value="0"/>
    </style:style>
    <style:style style:name="T25" style:family="text">
      <style:text-properties style:font-name="Consolas" fo:background-color="transparent" loext:char-shading-value="0"/>
    </style:style>
    <style:style style:name="T26" style:family="text">
      <style:text-properties style:font-name="Consolas" fo:background-color="transparent" loext:char-shading-value="0"/>
    </style:style>
    <style:style style:name="T27" style:family="text">
      <style:text-properties style:font-name="Consolas" fo:background-color="transparent" loext:char-shading-value="0"/>
    </style:style>
    <style:style style:name="T28" style:family="text">
      <style:text-properties style:font-name="Consolas" officeooo:rsid="0005e173"/>
    </style:style>
    <style:style style:name="T29" style:family="text">
      <style:text-properties style:font-name="Consolas" officeooo:rsid="0005e173"/>
    </style:style>
    <style:style style:name="T30" style:family="text">
      <style:text-properties style:font-name="Consolas" officeooo:rsid="00069977"/>
    </style:style>
    <style:style style:name="T31" style:family="text">
      <style:text-properties fo:color="#000000" style:font-name="Consolas" fo:font-size="13pt" officeooo:rsid="000511f2" style:font-size-asian="13pt" style:font-size-complex="13pt"/>
    </style:style>
    <style:style style:name="T32" style:family="text">
      <style:text-properties fo:color="#000000" style:font-name="Consolas" fo:font-size="13pt" style:font-size-asian="13pt" style:font-size-complex="13pt"/>
    </style:style>
    <style:style style:name="T33" style:family="text">
      <style:text-properties fo:color="#000000" style:font-name="Consolas" fo:font-size="13pt" style:font-size-asian="13pt" style:font-size-complex="13pt"/>
    </style:style>
    <style:style style:name="T34" style:family="text">
      <style:text-properties fo:color="#000000" style:font-name="Consolas" fo:font-size="13pt" style:font-size-asian="13pt" style:font-size-complex="13pt"/>
    </style:style>
    <style:style style:name="T35" style:family="text">
      <style:text-properties fo:color="#000000" style:font-name="Consolas" fo:font-size="13pt" style:font-size-asian="13pt" style:font-size-complex="13pt"/>
    </style:style>
    <style:style style:name="T36" style:family="text">
      <style:text-properties fo:color="#000000" style:font-name="Consolas" fo:font-size="13pt" fo:font-style="italic" fo:font-weight="bold" style:font-size-asian="13pt" style:font-style-asian="italic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Indica y justific que hace el siguinete trozo de codigo:</text:p>
      <text:p text:style-name="P1"><text:tab/></text:p>
      <text:p text:style-name="P1"><text:span text:style-name="T1"><text:tab/>...<text:tab/></text:span></text:p>
      <text:p text:style-name="P1"><text:span text:style-name="T1"><text:tab/>System</text:span><text:span text:style-name="T1">.</text:span><text:span text:style-name="T3">out</text:span><text:span text:style-name="T1">.</text:span><text:span text:style-name="T1">println</text:span><text:span text:style-name="T1">(</text:span><text:span text:style-name="T1">"Conexion abierta"</text:span><text:span text:style-name="T1">)</text:span><text:span text:style-name="T1">;</text:span></text:p>
      <text:p text:style-name="P4"><text:span text:style-name="T1"><text:tab/><text:tab/><text:tab/><text:tab/></text:span></text:p>
      <text:p text:style-name="P4"><text:span text:style-name="T1"><text:tab/></text:span><text:span text:style-name="T1">Statement</text:span><text:span text:style-name="T1"> </text:span><text:span text:style-name="T1">stmt</text:span><text:span text:style-name="T1"> </text:span><text:span text:style-name="T1">=</text:span><text:span text:style-name="T1"> </text:span><text:span text:style-name="T10">con</text:span><text:span text:style-name="T1">.</text:span><text:span text:style-name="T1">createStatement</text:span><text:span text:style-name="T1">()</text:span><text:span text:style-name="T1">;</text:span></text:p>
      <text:p text:style-name="P4"><text:span text:style-name="T1"><text:tab/></text:span><text:span text:style-name="T1">ResultSet</text:span><text:span text:style-name="T1"> </text:span><text:span text:style-name="T1">rs</text:span><text:span text:style-name="T1"> </text:span><text:span text:style-name="T1">=</text:span><text:span text:style-name="T1"> </text:span><text:span text:style-name="T1">stmt</text:span><text:span text:style-name="T1">.</text:span><text:span text:style-name="T1">executeQuery</text:span><text:span text:style-name="T1">(</text:span><text:span text:style-name="T1">"SELECT * FROM departamento"</text:span><text:span text:style-name="T1">)</text:span><text:span text:style-name="T1">;</text:span></text:p>
      <text:p text:style-name="P4"><text:span text:style-name="T1"><text:tab/></text:span></text:p>
      <text:p text:style-name="P4"><text:span text:style-name="T1"><text:tab/></text:span><text:span text:style-name="T1">while</text:span><text:span text:style-name="T1"> </text:span><text:span text:style-name="T1">(</text:span><text:span text:style-name="T1">rs</text:span><text:span text:style-name="T1">.</text:span><text:span text:style-name="T1">next</text:span><text:span text:style-name="T1">())</text:span><text:span text:style-name="T1"> </text:span><text:span text:style-name="T1">{</text:span></text:p>
      <text:p text:style-name="P4"><text:span text:style-name="T1"><text:tab/><text:tab/></text:span></text:p>
      <text:p text:style-name="P4"><text:span text:style-name="T1"><text:tab/><text:tab/></text:span><text:span text:style-name="T1">System</text:span><text:span text:style-name="T1">.</text:span><text:span text:style-name="T3">out</text:span><text:span text:style-name="T1">.</text:span><text:span text:style-name="T1">println</text:span><text:span text:style-name="T1">(</text:span><text:span text:style-name="T1">" <text:s/>"</text:span><text:span text:style-name="T1"> </text:span><text:span text:style-name="T1">+</text:span><text:span text:style-name="T1"> </text:span><text:span text:style-name="T1">rs</text:span><text:span text:style-name="T1">.</text:span><text:span text:style-name="T1">getString</text:span><text:span text:style-name="T1">(</text:span><text:span text:style-name="T1">1</text:span><text:span text:style-name="T1">)</text:span><text:span text:style-name="T1"> </text:span><text:span text:style-name="T1">+</text:span><text:span text:style-name="T1"> </text:span><text:span text:style-name="T1">" <text:s/>"</text:span><text:span text:style-name="T1"> </text:span><text:span text:style-name="T1">+</text:span><text:span text:style-name="T1"> </text:span><text:span text:style-name="T1">rs</text:span><text:span text:style-name="T1">.</text:span><text:span text:style-name="T1">getString</text:span><text:span text:style-name="T1">(</text:span><text:span text:style-name="T1">2</text:span><text:span text:style-name="T1">))</text:span><text:span text:style-name="T1">;</text:span></text:p>
      <text:p text:style-name="P4"><text:span text:style-name="T1"><text:tab/><text:tab/></text:span></text:p>
      <text:p text:style-name="P4"><text:span text:style-name="T1"><text:tab/><text:tab/></text:span><text:span text:style-name="T1">ResultSet</text:span><text:span text:style-name="T1"> </text:span><text:span text:style-name="T1">rs2</text:span><text:span text:style-name="T1"> </text:span><text:span text:style-name="T1">=</text:span><text:span text:style-name="T1"> </text:span><text:span text:style-name="T1">stmt</text:span><text:span text:style-name="T1">.</text:span><text:span text:style-name="T1">executeQuery</text:span><text:span text:style-name="T1">(</text:span><text:span text:style-name="T1">"SELECT * FROM departamento"</text:span><text:span text:style-name="T1">)</text:span><text:span text:style-name="T1">;</text:span></text:p>
      <text:p text:style-name="P4"><text:span text:style-name="T1"><text:tab/><text:tab/><text:tab/></text:span></text:p>
      <text:p text:style-name="P4"><text:span text:style-name="T1"><text:tab/><text:tab/></text:span><text:span text:style-name="T1">while</text:span><text:span text:style-name="T1"> </text:span><text:span text:style-name="T1">(</text:span><text:span text:style-name="T1">rs</text:span><text:span text:style-name="T1">.</text:span><text:span text:style-name="T1">next</text:span><text:span text:style-name="T1">())</text:span><text:span text:style-name="T1"> </text:span><text:span text:style-name="T1">{</text:span></text:p>
      <text:p text:style-name="P4"><text:span text:style-name="T1"><text:tab/><text:tab/><text:tab/></text:span><text:span text:style-name="T1">System</text:span><text:span text:style-name="T1">.</text:span><text:span text:style-name="T3">out</text:span><text:span text:style-name="T1">.</text:span><text:span text:style-name="T1">println</text:span><text:span text:style-name="T1">(</text:span><text:span text:style-name="T1">" <text:s/>"</text:span><text:span text:style-name="T1"> </text:span><text:span text:style-name="T1">+</text:span><text:span text:style-name="T1"> </text:span><text:span text:style-name="T1">rs</text:span><text:span text:style-name="T1">.</text:span><text:span text:style-name="T1">getString</text:span><text:span text:style-name="T1">(</text:span><text:span text:style-name="T1">2</text:span><text:span text:style-name="T1">))</text:span><text:span text:style-name="T1">;</text:span></text:p>
      <text:p text:style-name="P5"><text:span text:style-name="T1"><text:tab/><text:tab/></text:span><text:span text:style-name="T16">}</text:span><text:span text:style-name="T1"><text:tab/></text:span></text:p>
      <text:p text:style-name="P5"><text:span text:style-name="T1"><text:tab/></text:span></text:p>
      <text:p text:style-name="P5"><text:span text:style-name="T16"><text:s/><text:tab/>}</text:span></text:p>
      <text:p text:style-name="P4"><text:span text:style-name="T1"><text:tab/></text:span><text:span text:style-name="T16">...</text:span></text:p>
      <text:p text:style-name="P4"><text:span text:style-name="T16"/></text:p>
      <text:p text:style-name="P6"><text:span text:style-name="T1">Respuesta: El código de error, puesto que al ejecutar la primera sentencia y almacenar el resultado en rs se cierra el <text:s/></text:span><text:span text:style-name="T1">Statement</text:span><text:span text:style-name="T1"> </text:span><text:span text:style-name="T1">stmt, por lo que no se puede volver a utilizar para rs2</text:span></text:p>
      <text:p text:style-name="P6"><text:span text:style-name="T1"/></text:p>
      <text:p text:style-name="P6"><text:span text:style-name="T1">2 – modifica el ejercicio </text:span><text:span text:style-name="T28">anterior</text:span><text:span text:style-name="T1"> </text:span><text:span text:style-name="T28">para</text:span><text:span text:style-name="T1"> que utilizando un </text:span><text:span text:style-name="T1">Statement</text:span><text:span text:style-name="T1"> y un Prepared </text:span><text:span text:style-name="T1">Statement (en lugar de un unico Statement) muestre pro pantalla para cada plan de vuelo su identificador y las personas que viajan en el mismo.</text:span></text:p>
      <text:p text:style-name="P6"><text:span text:style-name="T1"><text:tab/></text:span></text:p>
      <text:p text:style-name="P6"><text:span text:style-name="T1"><text:tab/></text:span><text:span text:style-name="T1">...<text:tab/></text:span></text:p>
      <text:p text:style-name="P3"><text:span text:style-name="T31"><text:tab/>System</text:span><text:span text:style-name="T32">.</text:span><text:span text:style-name="T36">out</text:span><text:span text:style-name="T32">.</text:span><text:span text:style-name="T32">println</text:span><text:span text:style-name="T32">(</text:span><text:span text:style-name="T32">"Conexion abierta"</text:span><text:span text:style-name="T32">)</text:span><text:span text:style-name="T32">;</text:span></text:p>
      <text:p text:style-name="P4"><text:span text:style-name="T1"><text:tab/><text:tab/></text:span></text:p>
      <text:p text:style-name="P4"><text:span text:style-name="T1"><text:tab/></text:span><text:span text:style-name="T1">Statement</text:span><text:span text:style-name="T1"> </text:span><text:span text:style-name="T1">st</text:span><text:span text:style-name="T1"> </text:span><text:span text:style-name="T1">=</text:span><text:span text:style-name="T1"> </text:span><text:span text:style-name="T1">con</text:span><text:span text:style-name="T1">.</text:span><text:span text:style-name="T1">createStatement</text:span><text:span text:style-name="T1">()</text:span><text:span text:style-name="T1">;</text:span></text:p>
      <text:p text:style-name="P4"><text:span text:style-name="T1"><text:tab/></text:span><text:span text:style-name="T1">ResultSet</text:span><text:span text:style-name="T1"> </text:span><text:span text:style-name="T1">rs</text:span><text:span text:style-name="T1"> </text:span><text:span text:style-name="T1">=</text:span><text:span text:style-name="T1"> </text:span><text:span text:style-name="T1">st</text:span><text:span text:style-name="T1">.</text:span><text:span text:style-name="T1">executeQuery</text:span><text:span text:style-name="T1">(</text:span><text:span text:style-name="T1">"SELECT * FROM planvuelo"</text:span><text:span text:style-name="T1">)</text:span><text:span text:style-name="T1">;</text:span></text:p>
      <text:p text:style-name="P4"><text:span text:style-name="T1"><text:tab/><text:tab/></text:span></text:p>
      <text:p text:style-name="P4"><text:span text:style-name="T1"><text:tab/></text:span><text:span text:style-name="T1">String</text:span><text:span text:style-name="T1"> </text:span><text:span text:style-name="T1">sql</text:span><text:span text:style-name="T1"> </text:span><text:span text:style-name="T1">=</text:span><text:span text:style-name="T1"> </text:span><text:span text:style-name="T1">"SELECT * FROM vieja WHERE idvuelo = ?"</text:span><text:span text:style-name="T1">;</text:span></text:p>
      <text:p text:style-name="P4"><text:span text:style-name="T1"><text:tab/></text:span><text:span text:style-name="T1">PreparedStatement</text:span><text:span text:style-name="T1"> </text:span><text:span text:style-name="T19">ps</text:span><text:span text:style-name="T19"> </text:span><text:span text:style-name="T19">=</text:span><text:span text:style-name="T19"> </text:span><text:span text:style-name="T19">con</text:span><text:span text:style-name="T19">.</text:span><text:span text:style-name="T19">prepareStatement</text:span><text:span text:style-name="T19">(</text:span><text:span text:style-name="T19">sql</text:span><text:span text:style-name="T19">)</text:span><text:span text:style-name="T19">;</text:span><text:span text:style-name="T19"> </text:span></text:p>
      <text:p text:style-name="P9"><text:span text:style-name="T1"><text:tab/><text:tab/></text:span></text:p>
      <text:p text:style-name="P9"><text:span text:style-name="T1"><text:tab/></text:span><text:span text:style-name="T1">while</text:span><text:span text:style-name="T1"> </text:span><text:span text:style-name="T1">(</text:span><text:span text:style-name="T1">rs</text:span><text:span text:style-name="T1">.</text:span><text:span text:style-name="T1">next</text:span><text:span text:style-name="T1">())</text:span><text:span text:style-name="T1"> </text:span><text:span text:style-name="T1">{</text:span></text:p>
      <text:p text:style-name="P9"><text:span text:style-name="T1"><text:tab/><text:tab/><text:tab/></text:span></text:p>
      <text:p text:style-name="P9"><text:span text:style-name="T1"><text:tab/><text:tab/></text:span><text:span text:style-name="T1">System</text:span><text:span text:style-name="T1">.</text:span><text:span text:style-name="T3">out</text:span><text:span text:style-name="T1">.</text:span><text:span text:style-name="T1">println</text:span><text:span text:style-name="T1">(</text:span><text:span text:style-name="T1">rs</text:span><text:span text:style-name="T1">.</text:span><text:span text:style-name="T1">getString</text:span><text:span text:style-name="T1">(</text:span><text:span text:style-name="T1">"idvuelo"</text:span><text:span text:style-name="T1">))</text:span><text:span text:style-name="T1">;</text:span></text:p>
      <text:p text:style-name="P9"><text:span text:style-name="T1"><text:tab/><text:tab/></text:span></text:p>
      <text:p text:style-name="P9"><text:span text:style-name="T1"><text:tab/><text:tab/></text:span><text:span text:style-name="T1">ps</text:span><text:span text:style-name="T1">.</text:span><text:span text:style-name="T10">setInt</text:span><text:span text:style-name="T1">(</text:span><text:span text:style-name="T1">1</text:span><text:span text:style-name="T1">,</text:span><text:span text:style-name="T1">rs</text:span><text:span text:style-name="T1">.</text:span><text:span text:style-name="T1">getString</text:span><text:span text:style-name="T1">(</text:span><text:span text:style-name="T1">1</text:span><text:span text:style-name="T1">))</text:span><text:span text:style-name="T1">;</text:span></text:p>
      <text:p text:style-name="P9"><text:span text:style-name="T1"><text:tab/><text:tab/></text:span></text:p>
      <text:p text:style-name="P4"><text:span text:style-name="T19"><text:tab/><text:tab/></text:span><text:span text:style-name="T19">ResultSet</text:span><text:span text:style-name="T19"> </text:span><text:span text:style-name="T19">rs2</text:span><text:span text:style-name="T19"> </text:span><text:span text:style-name="T19">=</text:span><text:span text:style-name="T19"> </text:span><text:span text:style-name="T19">ps</text:span><text:span text:style-name="T19">.</text:span><text:span text:style-name="T1">executeQuery</text:span><text:span text:style-name="T1">()</text:span><text:span text:style-name="T1">;</text:span></text:p>
      <text:p text:style-name="P4"><text:span text:style-name="T1"><text:tab/><text:tab/><text:tab/></text:span></text:p>
      <text:p text:style-name="P4"><text:span text:style-name="T1"><text:tab/><text:tab/></text:span><text:span text:style-name="T1">while</text:span><text:span text:style-name="T1"> </text:span><text:span text:style-name="T1">(</text:span><text:span text:style-name="T1">rs</text:span><text:span text:style-name="T1">.</text:span><text:span text:style-name="T1">next</text:span><text:span text:style-name="T1">())</text:span><text:span text:style-name="T1"> </text:span><text:span text:style-name="T1">{</text:span></text:p>
      <text:p text:style-name="P4"><text:span text:style-name="T1"><text:tab/><text:tab/><text:tab/></text:span><text:span text:style-name="T1">System</text:span><text:span text:style-name="T1">.</text:span><text:span text:style-name="T3">out</text:span><text:span text:style-name="T1">.</text:span><text:span text:style-name="T1">println</text:span><text:span text:style-name="T1">(</text:span><text:span text:style-name="T1">rs2</text:span><text:span text:style-name="T1">.</text:span><text:span text:style-name="T1">getString</text:span><text:span text:style-name="T1">(</text:span><text:span text:style-name="T1">"idpersona"</text:span><text:span text:style-name="T1">))</text:span><text:span text:style-name="T1">;</text:span></text:p>
      <text:p text:style-name="P4"><text:span text:style-name="T1"><text:tab/><text:tab/></text:span><text:span text:style-name="T1">}</text:span><text:span text:style-name="T1"><text:tab/></text:span></text:p>
      <text:p text:style-name="P4"><text:span text:style-name="T1"><text:tab/></text:span></text:p>
      <text:p text:style-name="P2"><text:span text:style-name="T1"><text:tab/> </text:span><text:span text:style-name="T1">}</text:span></text:p>
      <text:p text:style-name="P6"><text:span text:style-name="T1"><text:tab/></text:span><text:span text:style-name="T1">...</text:span></text:p>
      <text:p text:style-name="P6"><text:span text:style-name="T1"><text:s/></text:span></text:p>
      <text:p text:style-name="P7"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>3 – Explica las diferencias principales entre los metodos executeQuery(Strin s) y executeUpdate(String s).</text:span></text:p>
      <text:p text:style-name="P7"><text:span text:style-name="T1"/></text:p>
      <text:p text:style-name="P7"><text:span text:style-name="T1"><text:tab/>executeQuery(Strin s) se utiliza para ejecutar sentencias de </text:span><text:span text:style-name="T30">proyección</text:span><text:span text:style-name="T1"> de datos como las Select y ademas devuelve un objeto de tipo ResultSet, </text:span></text:p>
      <text:p text:style-name="P7"><text:span text:style-name="T1"><text:tab/></text:span></text:p>
      <text:p text:style-name="P7"><text:span text:style-name="T1"><text:tab/>executeUpdate(String s) se utiliza para ejecutar </text:span><text:span text:style-name="T30">sentencias</text:span><text:span text:style-name="T1"> de </text:span><text:span text:style-name="T30">actualización</text:span><text:span text:style-name="T1"> de la base de datos como las Update table y devuelve un numero(int i) que es el numero de tuplas afectadas por la sentencia.</text:span></text:p>
      <text:p text:style-name="P8"><text:span text:style-name="T1"/></text:p>
      <text:p text:style-name="P8"><text:span text:style-name="T1">4 – Indica las </text:span><text:span text:style-name="T28">diferencias principales entre </text:span><text:span text:style-name="T1">los driver de MySQL y SQLite utilizados en clase.</text:span></text:p>
      <text:p text:style-name="P8"><text:span text:style-name="T1"/></text:p>
      <text:p text:style-name="P8"><text:span text:style-name="T1"><text:tab/>Tipo de ResultSet:</text:span></text:p>
      <text:p text:style-name="P8"><text:span text:style-name="T1"><text:tab/><text:tab/>SQLite solo tiene el TYPE_FORWARD_ONLY</text:span></text:p>
      <text:p text:style-name="P8"><text:span text:style-name="T1"><text:tab/><text:tab/>MySQL solo tiene el TYPE_SCROLL_INSENSITIVE.</text:span></text:p>
      <text:p text:style-name="P8"><text:span text:style-name="T1"><text:tab/></text:span></text:p>
      <text:p text:style-name="P8"><text:span text:style-name="T1"><text:tab/>Por esto el comportamiento del rs.next(9 es diferente en los dos puesto <text:tab/>que en MySQL se pueden utilizar métodos como rs.last() o rs.previous(), <text:tab/>pero en SQLite solo se puede utilizar el rs.next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3:30:44.600000000</meta:creation-date>
    <dc:date>2019-05-16T14:09:20.563000000</dc:date>
    <meta:editing-duration>PT5M54S</meta:editing-duration>
    <meta:editing-cycles>1</meta:editing-cycles>
    <meta:document-statistic meta:table-count="0" meta:image-count="0" meta:object-count="0" meta:page-count="2" meta:paragraph-count="57" meta:word-count="300" meta:character-count="2199" meta:non-whitespace-character-count="1837"/>
    <meta:generator>LibreOffice/6.2.3.2$Windows_X86_64 LibreOffice_project/aecc05fe267cc68dde00352a451aa867b3b546ac</meta:generator>
  </office:meta>
</office:document-meta>
</file>